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3" style:family="table-cell" style:parent-style-name="Default" style:data-style-name="N0">
      <style:table-cell-properties style:vertical-align="top" style:repeat-content="false"/>
      <style:paragraph-properties fo:text-align="start" fo:margin-left="0.353cm"/>
      <style:text-properties style:font-name="Arial" style:font-name-asian="Arial" style:font-name-complex="Arial" fo:font-size="24pt" style:font-size-asian="24pt" style:font-size-complex="24pt" style:font-family-generic="swiss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start" fo:margin-left="0.353cm"/>
      <style:text-properties fo:color="#FF0000" style:font-name="Arial" style:font-name-asian="Arial" style:font-name-complex="Arial" fo:font-size="20pt" style:font-size-asian="20pt" style:font-size-complex="20pt" style:font-family-generic="swiss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8AC0C3" style:repeat-content="false"/>
      <style:paragraph-properties fo:text-align="start" fo:margin-left="0.353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8AC0C3" style:repeat-content="false"/>
      <style:paragraph-properties fo:text-align="start" fo:margin-left="0.353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#8AC0C3" style:repeat-content="false"/>
      <style:paragraph-properties fo:text-align="start" fo:margin-left="0.353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cell-protect="none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0" style:family="table-cell" style:parent-style-name="Default" style:data-style-name="N0">
      <style:table-cell-properties fo:border-top="2pt solid #000000" fo:border-bottom="thin solid #000000" fo:border-left="none" fo:border-right="none" style:cell-protect="none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1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2" style:family="table-cell" style:parent-style-name="Default" style:data-style-name="N2">
      <style:table-cell-properties fo:border-top="2pt solid #000000" fo:border-bottom="thin solid #000000" fo:border-left="none" fo:border-right="none" style:vertical-align="automatic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3" style:family="table-cell" style:parent-style-name="Default" style:data-style-name="N2">
      <style:table-cell-properties fo:border-top="none" fo:border-bottom="thin solid #000000" fo:border-left="thin solid #000000" fo:border-right="2pt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4" style:family="table-cell" style:parent-style-name="Default" style:data-style-name="N0">
      <style:table-cell-properties fo:border="thin solid #000000" style:cell-protect="none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cell-protect="none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6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7" style:family="table-cell" style:parent-style-name="Default" style:data-style-name="N2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8" style:family="table-cell" style:parent-style-name="Default" style:data-style-name="N2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9" style:family="table-cell" style:parent-style-name="Default" style:data-style-name="N0">
      <style:table-cell-properties fo:border-top="thin solid #000000" fo:border-bottom="2pt solid #000000" fo:border-left="thin solid #000000" fo:border-right="thin solid #000000" style:cell-protect="none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cell-protect="none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21" style:family="table-cell" style:parent-style-name="Default" style:data-style-name="N2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22" style:family="table-cell" style:parent-style-name="Default" style:data-style-name="N2">
      <style:table-cell-properties fo:border-top="thin solid #000000" fo:border-bottom="2pt solid #000000" fo:border-left="none" fo:border-right="none" style:vertical-align="automatic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23" style:family="table-cell" style:parent-style-name="Default" style:data-style-name="N2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24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36pt" style:font-size-asian="36pt" style:font-size-complex="36pt" style:font-family-generic="swiss"/>
    </style:style>
    <style:style style:name="ce25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 fo:font-size="18pt" style:font-size-asian="18pt" style:font-size-complex="18pt" style:font-family-generic="swiss"/>
    </style:style>
    <style:style style:name="ce26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8pt" style:font-size-asian="18pt" style:font-size-complex="18pt" style:font-family-generic="swiss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  <style:text-properties style:font-name="Arial" style:font-name-asian="Arial" style:font-name-complex="Arial" fo:font-size="18pt" style:font-size-asian="18pt" style:font-size-complex="18pt" style:font-family-generic="swiss"/>
    </style:style>
    <style:style style:name="ce28" style:family="table-cell" style:parent-style-name="Hyperlink" style:data-style-name="N0">
      <style:table-cell-properties fo:border-top="none" fo:border-bottom="thin solid #000000" fo:border-left="thin solid #000000" fo:border-right="thin solid #000000" style:vertical-align="automatic" fo:wrap-option="wrap"/>
      <style:text-properties fo:color="#467886" style:font-name="Arial" style:font-name-asian="Arial" style:font-name-complex="Arial" fo:font-size="18pt" style:font-size-asian="18pt" style:font-size-complex="18pt" style:text-underline-style="solid" style:text-underline-type="single" style:font-family-generic="swiss"/>
    </style:style>
    <style:style style:name="ce29" style:family="table-cell" style:parent-style-name="Hyperlink" style:data-style-name="N0">
      <style:table-cell-properties style:vertical-align="automatic" fo:wrap-option="wrap"/>
      <style:text-properties fo:color="#467886" style:font-name="Arial" style:font-name-asian="Arial" style:font-name-complex="Arial" fo:font-size="18pt" style:font-size-asian="18pt" style:font-size-complex="18pt" style:text-underline-style="solid" style:text-underline-type="single" style:font-family-generic="swiss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32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36pt" style:font-size-asian="36pt" style:font-size-complex="36pt" style:font-family-generic="swiss"/>
    </style:style>
    <style:style style:name="ce33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#8AC0C3" style:repeat-content="false"/>
      <style:paragraph-properties fo:text-align="start" fo:margin-left="0.353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3.730625cm"/>
    </style:style>
    <style:style style:name="co4" style:family="table-column">
      <style:table-column-properties fo:break-before="auto" style:column-width="3.86291666666667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5.5310416666667cm"/>
    </style:style>
    <style:style style:name="co7" style:family="table-column">
      <style:table-column-properties fo:break-before="auto" style:column-width="2.98979166666667cm"/>
    </style:style>
    <style:style style:name="ro1" style:family="table-row">
      <style:table-row-properties style:row-height="119pt" style:use-optimal-row-height="false" fo:break-before="auto"/>
    </style:style>
    <style:style style:name="ro2" style:family="table-row">
      <style:table-row-properties style:row-height="77pt" style:use-optimal-row-height="false" fo:break-before="auto"/>
    </style:style>
    <style:style style:name="ro3" style:family="table-row">
      <style:table-row-properties style:row-height="64pt" style:use-optimal-row-height="false" fo:break-before="auto"/>
    </style:style>
    <style:style style:name="ro4" style:family="table-row">
      <style:table-row-properties style:row-height="85pt" style:use-optimal-row-height="false" fo:break-before="auto"/>
    </style:style>
    <style:style style:name="ro5" style:family="table-row">
      <style:table-row-properties style:row-height="25pt" style:use-optimal-row-height="false" fo:break-before="auto"/>
    </style:style>
    <style:style style:name="ro6" style:family="table-row">
      <style:table-row-properties style:row-height="16pt" style:use-optimal-row-height="true" fo:break-before="auto"/>
    </style:style>
    <style:style style:name="ro7" style:family="table-row">
      <style:table-row-properties style:row-height="46pt" style:use-optimal-row-height="true" fo:break-before="auto"/>
    </style:style>
    <style:style style:name="ro8" style:family="table-row">
      <style:table-row-properties style:row-height="24pt" style:use-optimal-row-height="true" fo:break-before="auto"/>
    </style:style>
    <style:style style:name="ro9" style:family="table-row">
      <style:table-row-properties style:row-height="23pt" style:use-optimal-row-height="true" fo:break-before="auto"/>
    </style:style>
    <style:style style:name="ro10" style:family="table-row">
      <style:table-row-properties style:row-height="48pt" style:use-optimal-row-height="true" fo:break-before="auto"/>
    </style:style>
    <style:style style:name="ro11" style:family="table-row">
      <style:table-row-properties style:row-height="24pt" style:use-optimal-row-height="false" fo:break-before="auto"/>
    </style:style>
    <style:style style:name="ro12" style:family="table-row">
      <style:table-row-properties style:row-height="21pt" style:use-optimal-row-height="true" fo:break-before="auto"/>
    </style:style>
    <style:style style:name="ro13" style:family="table-row">
      <style:table-row-properties style:row-height="70pt" style:use-optimal-row-height="false" fo:break-before="auto"/>
    </style:style>
    <style:style style:name="ro14" style:family="table-row">
      <style:table-row-properties style:row-height="67pt" style:use-optimal-row-height="false" fo:break-before="auto"/>
    </style:style>
    <style:style style:name="ro15" style:family="table-row">
      <style:table-row-properties style:row-height="2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5" style:family="table-cell" style:parent-style-name="Default" style:data-style-name="N0">
      <style:table-cell-properties fo:border-top="2pt solid #000000" fo:border-bottom="thin solid #000000" fo:border-left="none" fo:border-right="none" style:cell-protect="none"/>
      <style:text-properties style:font-name="Arial" style:font-name-asian="Arial" style:font-name-complex="Arial" fo:font-size="14pt" style:font-size-asian="14pt" style:font-size-complex="14pt" style:font-family-generic="swiss"/>
      <style:map style:condition="of:is-true-formula(AND(NOT(ISBLANK([.B5])); [.B5]=[.A5]))" style:apply-style-name="cf1" style:base-cell-address="OSS_Return.B5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 style:cell-protect="none"/>
      <style:text-properties style:font-name="Arial" style:font-name-asian="Arial" style:font-name-complex="Arial" fo:font-size="14pt" style:font-size-asian="14pt" style:font-size-complex="14pt" style:font-family-generic="swiss"/>
      <style:map style:condition="of:is-true-formula(AND(NOT(ISBLANK([.B5])); [.B5]=[.A5]))" style:apply-style-name="cf1" style:base-cell-address="OSS_Return.B5"/>
    </style:style>
    <style:style style:name="ce37" style:family="table-cell" style:parent-style-name="Default" style:data-style-name="N0">
      <style:table-cell-properties fo:border-top="none" fo:border-bottom="2pt solid #000000" fo:border-left="none" fo:border-right="none" style:cell-protect="none"/>
      <style:text-properties style:font-name="Arial" style:font-name-asian="Arial" style:font-name-complex="Arial" fo:font-size="14pt" style:font-size-asian="14pt" style:font-size-complex="14pt" style:font-family-generic="swiss"/>
      <style:map style:condition="of:is-true-formula(AND(NOT(ISBLANK([.B5])); [.B5]=[.A5]))" style:apply-style-name="cf1" style:base-cell-address="OSS_Return.B5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Notes.$A$16:.$A$42])" table:base-cell-address="OSS_Return.B6">
          <table:help-message table:display="true">
            <text:p>Start typing or select a country from the list.</text:p>
          </table:help-message>
          <table:error-message table:display="true">
            <text:p>Add a country name in the correct format. See Notes page for a list.</text:p>
          </table:error-message>
        </table:content-validation>
        <table:content-validation table:name="val2" table:condition="of:cell-content-is-in-list([Notes.$A$15:.$A$42])" table:base-cell-address="OSS_Return.A5">
          <table:help-message table:display="true">
            <text:p>Start typing or select a country from the list.</text:p>
          </table:help-message>
          <table:error-message table:display="true">
            <text:p>Add a country name in the correct format. See Notes page for a list.</text:p>
          </table:error-message>
        </table:content-validation>
        <table:content-validation table:name="val3" table:condition="of:cell-content-is-in-list(INDIRECT(SUBSTITUTE([.A5];&quot; &quot;;&quot;_&quot;)))" table:base-cell-address="OSS_Return.C5">
          <table:help-message table:display="true"/>
          <table:error-message table:display="true"/>
        </table:content-validation>
        <table:content-validation table:name="val4" table:condition="of:cell-content-is-in-list([Notes.$A$15:.$A$42])" table:base-cell-address="OSS_Return.B5">
          <table:help-message table:display="true">
            <text:p>Start typing or select a country from the list.</text:p>
          </table:help-message>
          <table:error-message table:display="true">
            <text:p>Add a country name in the correct format. See Notes page for a list.</text:p>
          </table:error-message>
        </table:content-validation>
      </table:content-validations>
      <table:table table:name="OSS_Return" table:style-name="ta1">
        <table:shapes>
          <draw:frame draw:z-index="1" draw:id="id0" draw:style-name="a0" draw:name="Picture 1" svg:x="0in" svg:y="0in" svg:width="2.59722in" svg:height="1.64777in" style:rel-width="scale" style:rel-height="scale">
            <draw:image xlink:href="media/image1.png" xlink:type="simple" xlink:show="embed" xlink:actuate="onLoad"/>
            <svg:title/>
            <svg:desc>HM Revenue and Customs logo</svg:desc>
          </draw:frame>
        </table:shapes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79" table:default-cell-style-name="ce2"/>
        <table:table-row table:style-name="ro1">
          <table:table-cell table:number-columns-repeated="5" table:style-name="ce2"/>
          <table:table-cell table:number-columns-repeated="16379" table:style-name="ce1"/>
        </table:table-row>
        <table:table-row table:style-name="ro2">
          <table:table-cell office:value-type="string" table:style-name="ce3">
            <text:p>One Stop Shop (OSS) VAT return</text:p>
          </table:table-cell>
          <table:table-cell table:style-name="ce3"/>
          <table:table-cell table:number-columns-repeated="3" table:style-name="ce2"/>
          <table:table-cell table:number-columns-repeated="16379" table:style-name="ce1"/>
        </table:table-row>
        <table:table-row table:style-name="ro3">
          <table:table-cell office:value-type="string" table:style-name="ce4">
            <text:p>When completed, save the spreadsheet as a CSV file.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4">
          <table:table-cell office:value-type="string" table:style-name="ce5">
            <text:p>Country your goods sold from</text:p>
          </table:table-cell>
          <table:table-cell office:value-type="string" table:style-name="ce5">
            <text:p>EU country you sold those goods to</text:p>
          </table:table-cell>
          <table:table-cell office:value-type="string" table:style-name="ce5">
            <text:p>VAT rate %</text:p>
          </table:table-cell>
          <table:table-cell office:value-type="string" table:style-name="ce6">
            <text:p>Net sales at that rate in £</text:p>
          </table:table-cell>
          <table:table-cell office:value-type="string" table:style-name="ce7">
            <text:p>VAT due on those sales in £</text:p>
          </table:table-cell>
          <table:table-cell table:number-columns-repeated="16379" table:style-name="ce8"/>
        </table:table-row>
        <table:table-row table:style-name="ro5">
          <table:table-cell table:content-validation-name="val2" table:style-name="ce9"/>
          <table:table-cell table:content-validation-name="val4" table:style-name="ce35"/>
          <table:table-cell table:content-validation-name="val3" table:style-name="ce11"/>
          <table:table-cell table:style-name="ce12"/>
          <table:table-cell office:value-type="string" office:string-value=" " table:formula="of:=IF(([.D5]*([.C5]/100))=0;&quot; &quot;;(IF(MOD(([.D5]*([.C5]/100))*100;1)=0.5;IF(MOD(INT(([.D5]*([.C5]/100))*100);2)=0;INT(([.D5]*([.C5]/100))*100);INT(([.D5]*([.C5]/100))*100)+1);IF(MOD(([.D5]*([.C5]/100))*100;1)=-0.5;IF(MOD(INT(([.D5]*([.C5]/100))*100);2)=0;INT(([.D5]*([.C5]/100))*100);INT(([.D5]*([.C5]/100))*100)-1);ROUND(([.D5]*([.C5]/100))*100;0)))/100))" table:style-name="ce13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6]*([.C6]/100))=0;&quot; &quot;;(IF(MOD(([.D6]*([.C6]/100))*100;1)=0.5;IF(MOD(INT(([.D6]*([.C6]/100))*100);2)=0;INT(([.D6]*([.C6]/100))*100);INT(([.D6]*([.C6]/100))*100)+1);IF(MOD(([.D6]*([.C6]/100))*100;1)=-0.5;IF(MOD(INT(([.D6]*([.C6]/100))*100);2)=0;INT(([.D6]*([.C6]/100))*100);INT(([.D6]*([.C6]/100))*100)-1);ROUND(([.D6]*([.C6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7]*([.C7]/100))=0;&quot; &quot;;(IF(MOD(([.D7]*([.C7]/100))*100;1)=0.5;IF(MOD(INT(([.D7]*([.C7]/100))*100);2)=0;INT(([.D7]*([.C7]/100))*100);INT(([.D7]*([.C7]/100))*100)+1);IF(MOD(([.D7]*([.C7]/100))*100;1)=-0.5;IF(MOD(INT(([.D7]*([.C7]/100))*100);2)=0;INT(([.D7]*([.C7]/100))*100);INT(([.D7]*([.C7]/100))*100)-1);ROUND(([.D7]*([.C7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8]*([.C8]/100))=0;&quot; &quot;;(IF(MOD(([.D8]*([.C8]/100))*100;1)=0.5;IF(MOD(INT(([.D8]*([.C8]/100))*100);2)=0;INT(([.D8]*([.C8]/100))*100);INT(([.D8]*([.C8]/100))*100)+1);IF(MOD(([.D8]*([.C8]/100))*100;1)=-0.5;IF(MOD(INT(([.D8]*([.C8]/100))*100);2)=0;INT(([.D8]*([.C8]/100))*100);INT(([.D8]*([.C8]/100))*100)-1);ROUND(([.D8]*([.C8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table:style-name="ce18"/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10]*([.C10]/100))=0;&quot; &quot;;(IF(MOD(([.D10]*([.C10]/100))*100;1)=0.5;IF(MOD(INT(([.D10]*([.C10]/100))*100);2)=0;INT(([.D10]*([.C10]/100))*100);INT(([.D10]*([.C10]/100))*100)+1);IF(MOD(([.D10]*([.C10]/100))*100;1)=-0.5;IF(MOD(INT(([.D10]*([.C10]/100))*100);2)=0;INT(([.D10]*([.C10]/100))*100);INT(([.D10]*([.C10]/100))*100)-1);ROUND(([.D10]*([.C10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11]*([.C11]/100))=0;&quot; &quot;;(IF(MOD(([.D11]*([.C11]/100))*100;1)=0.5;IF(MOD(INT(([.D11]*([.C11]/100))*100);2)=0;INT(([.D11]*([.C11]/100))*100);INT(([.D11]*([.C11]/100))*100)+1);IF(MOD(([.D11]*([.C11]/100))*100;1)=-0.5;IF(MOD(INT(([.D11]*([.C11]/100))*100);2)=0;INT(([.D11]*([.C11]/100))*100);INT(([.D11]*([.C11]/100))*100)-1);ROUND(([.D11]*([.C11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12]*([.C12]/100))=0;&quot; &quot;;(IF(MOD(([.D12]*([.C12]/100))*100;1)=0.5;IF(MOD(INT(([.D12]*([.C12]/100))*100);2)=0;INT(([.D12]*([.C12]/100))*100);INT(([.D12]*([.C12]/100))*100)+1);IF(MOD(([.D12]*([.C12]/100))*100;1)=-0.5;IF(MOD(INT(([.D12]*([.C12]/100))*100);2)=0;INT(([.D12]*([.C12]/100))*100);INT(([.D12]*([.C12]/100))*100)-1);ROUND(([.D12]*([.C12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13]*([.C13]/100))=0;&quot; &quot;;(IF(MOD(([.D13]*([.C13]/100))*100;1)=0.5;IF(MOD(INT(([.D13]*([.C13]/100))*100);2)=0;INT(([.D13]*([.C13]/100))*100);INT(([.D13]*([.C13]/100))*100)+1);IF(MOD(([.D13]*([.C13]/100))*100;1)=-0.5;IF(MOD(INT(([.D13]*([.C13]/100))*100);2)=0;INT(([.D13]*([.C13]/100))*100);INT(([.D13]*([.C13]/100))*100)-1);ROUND(([.D13]*([.C13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14]*([.C14]/100))=0;&quot; &quot;;(IF(MOD(([.D14]*([.C14]/100))*100;1)=0.5;IF(MOD(INT(([.D14]*([.C14]/100))*100);2)=0;INT(([.D14]*([.C14]/100))*100);INT(([.D14]*([.C14]/100))*100)+1);IF(MOD(([.D14]*([.C14]/100))*100;1)=-0.5;IF(MOD(INT(([.D14]*([.C14]/100))*100);2)=0;INT(([.D14]*([.C14]/100))*100);INT(([.D14]*([.C14]/100))*100)-1);ROUND(([.D14]*([.C14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15]*([.C15]/100))=0;&quot; &quot;;(IF(MOD(([.D15]*([.C15]/100))*100;1)=0.5;IF(MOD(INT(([.D15]*([.C15]/100))*100);2)=0;INT(([.D15]*([.C15]/100))*100);INT(([.D15]*([.C15]/100))*100)+1);IF(MOD(([.D15]*([.C15]/100))*100;1)=-0.5;IF(MOD(INT(([.D15]*([.C15]/100))*100);2)=0;INT(([.D15]*([.C15]/100))*100);INT(([.D15]*([.C15]/100))*100)-1);ROUND(([.D15]*([.C15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16]*([.C16]/100))=0;&quot; &quot;;(IF(MOD(([.D16]*([.C16]/100))*100;1)=0.5;IF(MOD(INT(([.D16]*([.C16]/100))*100);2)=0;INT(([.D16]*([.C16]/100))*100);INT(([.D16]*([.C16]/100))*100)+1);IF(MOD(([.D16]*([.C16]/100))*100;1)=-0.5;IF(MOD(INT(([.D16]*([.C16]/100))*100);2)=0;INT(([.D16]*([.C16]/100))*100);INT(([.D16]*([.C16]/100))*100)-1);ROUND(([.D16]*([.C16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17]*([.C17]/100))=0;&quot; &quot;;(IF(MOD(([.D17]*([.C17]/100))*100;1)=0.5;IF(MOD(INT(([.D17]*([.C17]/100))*100);2)=0;INT(([.D17]*([.C17]/100))*100);INT(([.D17]*([.C17]/100))*100)+1);IF(MOD(([.D17]*([.C17]/100))*100;1)=-0.5;IF(MOD(INT(([.D17]*([.C17]/100))*100);2)=0;INT(([.D17]*([.C17]/100))*100);INT(([.D17]*([.C17]/100))*100)-1);ROUND(([.D17]*([.C17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18]*([.C18]/100))=0;&quot; &quot;;(IF(MOD(([.D18]*([.C18]/100))*100;1)=0.5;IF(MOD(INT(([.D18]*([.C18]/100))*100);2)=0;INT(([.D18]*([.C18]/100))*100);INT(([.D18]*([.C18]/100))*100)+1);IF(MOD(([.D18]*([.C18]/100))*100;1)=-0.5;IF(MOD(INT(([.D18]*([.C18]/100))*100);2)=0;INT(([.D18]*([.C18]/100))*100);INT(([.D18]*([.C18]/100))*100)-1);ROUND(([.D18]*([.C18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19]*([.C19]/100))=0;&quot; &quot;;(IF(MOD(([.D19]*([.C19]/100))*100;1)=0.5;IF(MOD(INT(([.D19]*([.C19]/100))*100);2)=0;INT(([.D19]*([.C19]/100))*100);INT(([.D19]*([.C19]/100))*100)+1);IF(MOD(([.D19]*([.C19]/100))*100;1)=-0.5;IF(MOD(INT(([.D19]*([.C19]/100))*100);2)=0;INT(([.D19]*([.C19]/100))*100);INT(([.D19]*([.C19]/100))*100)-1);ROUND(([.D19]*([.C19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20]*([.C20]/100))=0;&quot; &quot;;(IF(MOD(([.D20]*([.C20]/100))*100;1)=0.5;IF(MOD(INT(([.D20]*([.C20]/100))*100);2)=0;INT(([.D20]*([.C20]/100))*100);INT(([.D20]*([.C20]/100))*100)+1);IF(MOD(([.D20]*([.C20]/100))*100;1)=-0.5;IF(MOD(INT(([.D20]*([.C20]/100))*100);2)=0;INT(([.D20]*([.C20]/100))*100);INT(([.D20]*([.C20]/100))*100)-1);ROUND(([.D20]*([.C20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21]*([.C21]/100))=0;&quot; &quot;;(IF(MOD(([.D21]*([.C21]/100))*100;1)=0.5;IF(MOD(INT(([.D21]*([.C21]/100))*100);2)=0;INT(([.D21]*([.C21]/100))*100);INT(([.D21]*([.C21]/100))*100)+1);IF(MOD(([.D21]*([.C21]/100))*100;1)=-0.5;IF(MOD(INT(([.D21]*([.C21]/100))*100);2)=0;INT(([.D21]*([.C21]/100))*100);INT(([.D21]*([.C21]/100))*100)-1);ROUND(([.D21]*([.C21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22]*([.C22]/100))=0;&quot; &quot;;(IF(MOD(([.D22]*([.C22]/100))*100;1)=0.5;IF(MOD(INT(([.D22]*([.C22]/100))*100);2)=0;INT(([.D22]*([.C22]/100))*100);INT(([.D22]*([.C22]/100))*100)+1);IF(MOD(([.D22]*([.C22]/100))*100;1)=-0.5;IF(MOD(INT(([.D22]*([.C22]/100))*100);2)=0;INT(([.D22]*([.C22]/100))*100);INT(([.D22]*([.C22]/100))*100)-1);ROUND(([.D22]*([.C22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23]*([.C23]/100))=0;&quot; &quot;;(IF(MOD(([.D23]*([.C23]/100))*100;1)=0.5;IF(MOD(INT(([.D23]*([.C23]/100))*100);2)=0;INT(([.D23]*([.C23]/100))*100);INT(([.D23]*([.C23]/100))*100)+1);IF(MOD(([.D23]*([.C23]/100))*100;1)=-0.5;IF(MOD(INT(([.D23]*([.C23]/100))*100);2)=0;INT(([.D23]*([.C23]/100))*100);INT(([.D23]*([.C23]/100))*100)-1);ROUND(([.D23]*([.C23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24]*([.C24]/100))=0;&quot; &quot;;(IF(MOD(([.D24]*([.C24]/100))*100;1)=0.5;IF(MOD(INT(([.D24]*([.C24]/100))*100);2)=0;INT(([.D24]*([.C24]/100))*100);INT(([.D24]*([.C24]/100))*100)+1);IF(MOD(([.D24]*([.C24]/100))*100;1)=-0.5;IF(MOD(INT(([.D24]*([.C24]/100))*100);2)=0;INT(([.D24]*([.C24]/100))*100);INT(([.D24]*([.C24]/100))*100)-1);ROUND(([.D24]*([.C24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25]*([.C25]/100))=0;&quot; &quot;;(IF(MOD(([.D25]*([.C25]/100))*100;1)=0.5;IF(MOD(INT(([.D25]*([.C25]/100))*100);2)=0;INT(([.D25]*([.C25]/100))*100);INT(([.D25]*([.C25]/100))*100)+1);IF(MOD(([.D25]*([.C25]/100))*100;1)=-0.5;IF(MOD(INT(([.D25]*([.C25]/100))*100);2)=0;INT(([.D25]*([.C25]/100))*100);INT(([.D25]*([.C25]/100))*100)-1);ROUND(([.D25]*([.C25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26]*([.C26]/100))=0;&quot; &quot;;(IF(MOD(([.D26]*([.C26]/100))*100;1)=0.5;IF(MOD(INT(([.D26]*([.C26]/100))*100);2)=0;INT(([.D26]*([.C26]/100))*100);INT(([.D26]*([.C26]/100))*100)+1);IF(MOD(([.D26]*([.C26]/100))*100;1)=-0.5;IF(MOD(INT(([.D26]*([.C26]/100))*100);2)=0;INT(([.D26]*([.C26]/100))*100);INT(([.D26]*([.C26]/100))*100)-1);ROUND(([.D26]*([.C26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27]*([.C27]/100))=0;&quot; &quot;;(IF(MOD(([.D27]*([.C27]/100))*100;1)=0.5;IF(MOD(INT(([.D27]*([.C27]/100))*100);2)=0;INT(([.D27]*([.C27]/100))*100);INT(([.D27]*([.C27]/100))*100)+1);IF(MOD(([.D27]*([.C27]/100))*100;1)=-0.5;IF(MOD(INT(([.D27]*([.C27]/100))*100);2)=0;INT(([.D27]*([.C27]/100))*100);INT(([.D27]*([.C27]/100))*100)-1);ROUND(([.D27]*([.C27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28]*([.C28]/100))=0;&quot; &quot;;(IF(MOD(([.D28]*([.C28]/100))*100;1)=0.5;IF(MOD(INT(([.D28]*([.C28]/100))*100);2)=0;INT(([.D28]*([.C28]/100))*100);INT(([.D28]*([.C28]/100))*100)+1);IF(MOD(([.D28]*([.C28]/100))*100;1)=-0.5;IF(MOD(INT(([.D28]*([.C28]/100))*100);2)=0;INT(([.D28]*([.C28]/100))*100);INT(([.D28]*([.C28]/100))*100)-1);ROUND(([.D28]*([.C28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29]*([.C29]/100))=0;&quot; &quot;;(IF(MOD(([.D29]*([.C29]/100))*100;1)=0.5;IF(MOD(INT(([.D29]*([.C29]/100))*100);2)=0;INT(([.D29]*([.C29]/100))*100);INT(([.D29]*([.C29]/100))*100)+1);IF(MOD(([.D29]*([.C29]/100))*100;1)=-0.5;IF(MOD(INT(([.D29]*([.C29]/100))*100);2)=0;INT(([.D29]*([.C29]/100))*100);INT(([.D29]*([.C29]/100))*100)-1);ROUND(([.D29]*([.C29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30]*([.C30]/100))=0;&quot; &quot;;(IF(MOD(([.D30]*([.C30]/100))*100;1)=0.5;IF(MOD(INT(([.D30]*([.C30]/100))*100);2)=0;INT(([.D30]*([.C30]/100))*100);INT(([.D30]*([.C30]/100))*100)+1);IF(MOD(([.D30]*([.C30]/100))*100;1)=-0.5;IF(MOD(INT(([.D30]*([.C30]/100))*100);2)=0;INT(([.D30]*([.C30]/100))*100);INT(([.D30]*([.C30]/100))*100)-1);ROUND(([.D30]*([.C30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31]*([.C31]/100))=0;&quot; &quot;;(IF(MOD(([.D31]*([.C31]/100))*100;1)=0.5;IF(MOD(INT(([.D31]*([.C31]/100))*100);2)=0;INT(([.D31]*([.C31]/100))*100);INT(([.D31]*([.C31]/100))*100)+1);IF(MOD(([.D31]*([.C31]/100))*100;1)=-0.5;IF(MOD(INT(([.D31]*([.C31]/100))*100);2)=0;INT(([.D31]*([.C31]/100))*100);INT(([.D31]*([.C31]/100))*100)-1);ROUND(([.D31]*([.C31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32]*([.C32]/100))=0;&quot; &quot;;(IF(MOD(([.D32]*([.C32]/100))*100;1)=0.5;IF(MOD(INT(([.D32]*([.C32]/100))*100);2)=0;INT(([.D32]*([.C32]/100))*100);INT(([.D32]*([.C32]/100))*100)+1);IF(MOD(([.D32]*([.C32]/100))*100;1)=-0.5;IF(MOD(INT(([.D32]*([.C32]/100))*100);2)=0;INT(([.D32]*([.C32]/100))*100);INT(([.D32]*([.C32]/100))*100)-1);ROUND(([.D32]*([.C32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33]*([.C33]/100))=0;&quot; &quot;;(IF(MOD(([.D33]*([.C33]/100))*100;1)=0.5;IF(MOD(INT(([.D33]*([.C33]/100))*100);2)=0;INT(([.D33]*([.C33]/100))*100);INT(([.D33]*([.C33]/100))*100)+1);IF(MOD(([.D33]*([.C33]/100))*100;1)=-0.5;IF(MOD(INT(([.D33]*([.C33]/100))*100);2)=0;INT(([.D33]*([.C33]/100))*100);INT(([.D33]*([.C33]/100))*100)-1);ROUND(([.D33]*([.C33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34]*([.C34]/100))=0;&quot; &quot;;(IF(MOD(([.D34]*([.C34]/100))*100;1)=0.5;IF(MOD(INT(([.D34]*([.C34]/100))*100);2)=0;INT(([.D34]*([.C34]/100))*100);INT(([.D34]*([.C34]/100))*100)+1);IF(MOD(([.D34]*([.C34]/100))*100;1)=-0.5;IF(MOD(INT(([.D34]*([.C34]/100))*100);2)=0;INT(([.D34]*([.C34]/100))*100);INT(([.D34]*([.C34]/100))*100)-1);ROUND(([.D34]*([.C34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35]*([.C35]/100))=0;&quot; &quot;;(IF(MOD(([.D35]*([.C35]/100))*100;1)=0.5;IF(MOD(INT(([.D35]*([.C35]/100))*100);2)=0;INT(([.D35]*([.C35]/100))*100);INT(([.D35]*([.C35]/100))*100)+1);IF(MOD(([.D35]*([.C35]/100))*100;1)=-0.5;IF(MOD(INT(([.D35]*([.C35]/100))*100);2)=0;INT(([.D35]*([.C35]/100))*100);INT(([.D35]*([.C35]/100))*100)-1);ROUND(([.D35]*([.C35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36]*([.C36]/100))=0;&quot; &quot;;(IF(MOD(([.D36]*([.C36]/100))*100;1)=0.5;IF(MOD(INT(([.D36]*([.C36]/100))*100);2)=0;INT(([.D36]*([.C36]/100))*100);INT(([.D36]*([.C36]/100))*100)+1);IF(MOD(([.D36]*([.C36]/100))*100;1)=-0.5;IF(MOD(INT(([.D36]*([.C36]/100))*100);2)=0;INT(([.D36]*([.C36]/100))*100);INT(([.D36]*([.C36]/100))*100)-1);ROUND(([.D36]*([.C36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37]*([.C37]/100))=0;&quot; &quot;;(IF(MOD(([.D37]*([.C37]/100))*100;1)=0.5;IF(MOD(INT(([.D37]*([.C37]/100))*100);2)=0;INT(([.D37]*([.C37]/100))*100);INT(([.D37]*([.C37]/100))*100)+1);IF(MOD(([.D37]*([.C37]/100))*100;1)=-0.5;IF(MOD(INT(([.D37]*([.C37]/100))*100);2)=0;INT(([.D37]*([.C37]/100))*100);INT(([.D37]*([.C37]/100))*100)-1);ROUND(([.D37]*([.C37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38]*([.C38]/100))=0;&quot; &quot;;(IF(MOD(([.D38]*([.C38]/100))*100;1)=0.5;IF(MOD(INT(([.D38]*([.C38]/100))*100);2)=0;INT(([.D38]*([.C38]/100))*100);INT(([.D38]*([.C38]/100))*100)+1);IF(MOD(([.D38]*([.C38]/100))*100;1)=-0.5;IF(MOD(INT(([.D38]*([.C38]/100))*100);2)=0;INT(([.D38]*([.C38]/100))*100);INT(([.D38]*([.C38]/100))*100)-1);ROUND(([.D38]*([.C38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39]*([.C39]/100))=0;&quot; &quot;;(IF(MOD(([.D39]*([.C39]/100))*100;1)=0.5;IF(MOD(INT(([.D39]*([.C39]/100))*100);2)=0;INT(([.D39]*([.C39]/100))*100);INT(([.D39]*([.C39]/100))*100)+1);IF(MOD(([.D39]*([.C39]/100))*100;1)=-0.5;IF(MOD(INT(([.D39]*([.C39]/100))*100);2)=0;INT(([.D39]*([.C39]/100))*100);INT(([.D39]*([.C39]/100))*100)-1);ROUND(([.D39]*([.C39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40]*([.C40]/100))=0;&quot; &quot;;(IF(MOD(([.D40]*([.C40]/100))*100;1)=0.5;IF(MOD(INT(([.D40]*([.C40]/100))*100);2)=0;INT(([.D40]*([.C40]/100))*100);INT(([.D40]*([.C40]/100))*100)+1);IF(MOD(([.D40]*([.C40]/100))*100;1)=-0.5;IF(MOD(INT(([.D40]*([.C40]/100))*100);2)=0;INT(([.D40]*([.C40]/100))*100);INT(([.D40]*([.C40]/100))*100)-1);ROUND(([.D40]*([.C40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41]*([.C41]/100))=0;&quot; &quot;;(IF(MOD(([.D41]*([.C41]/100))*100;1)=0.5;IF(MOD(INT(([.D41]*([.C41]/100))*100);2)=0;INT(([.D41]*([.C41]/100))*100);INT(([.D41]*([.C41]/100))*100)+1);IF(MOD(([.D41]*([.C41]/100))*100;1)=-0.5;IF(MOD(INT(([.D41]*([.C41]/100))*100);2)=0;INT(([.D41]*([.C41]/100))*100);INT(([.D41]*([.C41]/100))*100)-1);ROUND(([.D41]*([.C41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42]*([.C42]/100))=0;&quot; &quot;;(IF(MOD(([.D42]*([.C42]/100))*100;1)=0.5;IF(MOD(INT(([.D42]*([.C42]/100))*100);2)=0;INT(([.D42]*([.C42]/100))*100);INT(([.D42]*([.C42]/100))*100)+1);IF(MOD(([.D42]*([.C42]/100))*100;1)=-0.5;IF(MOD(INT(([.D42]*([.C42]/100))*100);2)=0;INT(([.D42]*([.C42]/100))*100);INT(([.D42]*([.C42]/100))*100)-1);ROUND(([.D42]*([.C42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43]*([.C43]/100))=0;&quot; &quot;;(IF(MOD(([.D43]*([.C43]/100))*100;1)=0.5;IF(MOD(INT(([.D43]*([.C43]/100))*100);2)=0;INT(([.D43]*([.C43]/100))*100);INT(([.D43]*([.C43]/100))*100)+1);IF(MOD(([.D43]*([.C43]/100))*100;1)=-0.5;IF(MOD(INT(([.D43]*([.C43]/100))*100);2)=0;INT(([.D43]*([.C43]/100))*100);INT(([.D43]*([.C43]/100))*100)-1);ROUND(([.D43]*([.C43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44]*([.C44]/100))=0;&quot; &quot;;(IF(MOD(([.D44]*([.C44]/100))*100;1)=0.5;IF(MOD(INT(([.D44]*([.C44]/100))*100);2)=0;INT(([.D44]*([.C44]/100))*100);INT(([.D44]*([.C44]/100))*100)+1);IF(MOD(([.D44]*([.C44]/100))*100;1)=-0.5;IF(MOD(INT(([.D44]*([.C44]/100))*100);2)=0;INT(([.D44]*([.C44]/100))*100);INT(([.D44]*([.C44]/100))*100)-1);ROUND(([.D44]*([.C44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45]*([.C45]/100))=0;&quot; &quot;;(IF(MOD(([.D45]*([.C45]/100))*100;1)=0.5;IF(MOD(INT(([.D45]*([.C45]/100))*100);2)=0;INT(([.D45]*([.C45]/100))*100);INT(([.D45]*([.C45]/100))*100)+1);IF(MOD(([.D45]*([.C45]/100))*100;1)=-0.5;IF(MOD(INT(([.D45]*([.C45]/100))*100);2)=0;INT(([.D45]*([.C45]/100))*100);INT(([.D45]*([.C45]/100))*100)-1);ROUND(([.D45]*([.C45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46]*([.C46]/100))=0;&quot; &quot;;(IF(MOD(([.D46]*([.C46]/100))*100;1)=0.5;IF(MOD(INT(([.D46]*([.C46]/100))*100);2)=0;INT(([.D46]*([.C46]/100))*100);INT(([.D46]*([.C46]/100))*100)+1);IF(MOD(([.D46]*([.C46]/100))*100;1)=-0.5;IF(MOD(INT(([.D46]*([.C46]/100))*100);2)=0;INT(([.D46]*([.C46]/100))*100);INT(([.D46]*([.C46]/100))*100)-1);ROUND(([.D46]*([.C46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47]*([.C47]/100))=0;&quot; &quot;;(IF(MOD(([.D47]*([.C47]/100))*100;1)=0.5;IF(MOD(INT(([.D47]*([.C47]/100))*100);2)=0;INT(([.D47]*([.C47]/100))*100);INT(([.D47]*([.C47]/100))*100)+1);IF(MOD(([.D47]*([.C47]/100))*100;1)=-0.5;IF(MOD(INT(([.D47]*([.C47]/100))*100);2)=0;INT(([.D47]*([.C47]/100))*100);INT(([.D47]*([.C47]/100))*100)-1);ROUND(([.D47]*([.C47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48]*([.C48]/100))=0;&quot; &quot;;(IF(MOD(([.D48]*([.C48]/100))*100;1)=0.5;IF(MOD(INT(([.D48]*([.C48]/100))*100);2)=0;INT(([.D48]*([.C48]/100))*100);INT(([.D48]*([.C48]/100))*100)+1);IF(MOD(([.D48]*([.C48]/100))*100;1)=-0.5;IF(MOD(INT(([.D48]*([.C48]/100))*100);2)=0;INT(([.D48]*([.C48]/100))*100);INT(([.D48]*([.C48]/100))*100)-1);ROUND(([.D48]*([.C48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49]*([.C49]/100))=0;&quot; &quot;;(IF(MOD(([.D49]*([.C49]/100))*100;1)=0.5;IF(MOD(INT(([.D49]*([.C49]/100))*100);2)=0;INT(([.D49]*([.C49]/100))*100);INT(([.D49]*([.C49]/100))*100)+1);IF(MOD(([.D49]*([.C49]/100))*100;1)=-0.5;IF(MOD(INT(([.D49]*([.C49]/100))*100);2)=0;INT(([.D49]*([.C49]/100))*100);INT(([.D49]*([.C49]/100))*100)-1);ROUND(([.D49]*([.C49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50]*([.C50]/100))=0;&quot; &quot;;(IF(MOD(([.D50]*([.C50]/100))*100;1)=0.5;IF(MOD(INT(([.D50]*([.C50]/100))*100);2)=0;INT(([.D50]*([.C50]/100))*100);INT(([.D50]*([.C50]/100))*100)+1);IF(MOD(([.D50]*([.C50]/100))*100;1)=-0.5;IF(MOD(INT(([.D50]*([.C50]/100))*100);2)=0;INT(([.D50]*([.C50]/100))*100);INT(([.D50]*([.C50]/100))*100)-1);ROUND(([.D50]*([.C50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51]*([.C51]/100))=0;&quot; &quot;;(IF(MOD(([.D51]*([.C51]/100))*100;1)=0.5;IF(MOD(INT(([.D51]*([.C51]/100))*100);2)=0;INT(([.D51]*([.C51]/100))*100);INT(([.D51]*([.C51]/100))*100)+1);IF(MOD(([.D51]*([.C51]/100))*100;1)=-0.5;IF(MOD(INT(([.D51]*([.C51]/100))*100);2)=0;INT(([.D51]*([.C51]/100))*100);INT(([.D51]*([.C51]/100))*100)-1);ROUND(([.D51]*([.C51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52]*([.C52]/100))=0;&quot; &quot;;(IF(MOD(([.D52]*([.C52]/100))*100;1)=0.5;IF(MOD(INT(([.D52]*([.C52]/100))*100);2)=0;INT(([.D52]*([.C52]/100))*100);INT(([.D52]*([.C52]/100))*100)+1);IF(MOD(([.D52]*([.C52]/100))*100;1)=-0.5;IF(MOD(INT(([.D52]*([.C52]/100))*100);2)=0;INT(([.D52]*([.C52]/100))*100);INT(([.D52]*([.C52]/100))*100)-1);ROUND(([.D52]*([.C52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53]*([.C53]/100))=0;&quot; &quot;;(IF(MOD(([.D53]*([.C53]/100))*100;1)=0.5;IF(MOD(INT(([.D53]*([.C53]/100))*100);2)=0;INT(([.D53]*([.C53]/100))*100);INT(([.D53]*([.C53]/100))*100)+1);IF(MOD(([.D53]*([.C53]/100))*100;1)=-0.5;IF(MOD(INT(([.D53]*([.C53]/100))*100);2)=0;INT(([.D53]*([.C53]/100))*100);INT(([.D53]*([.C53]/100))*100)-1);ROUND(([.D53]*([.C53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54]*([.C54]/100))=0;&quot; &quot;;(IF(MOD(([.D54]*([.C54]/100))*100;1)=0.5;IF(MOD(INT(([.D54]*([.C54]/100))*100);2)=0;INT(([.D54]*([.C54]/100))*100);INT(([.D54]*([.C54]/100))*100)+1);IF(MOD(([.D54]*([.C54]/100))*100;1)=-0.5;IF(MOD(INT(([.D54]*([.C54]/100))*100);2)=0;INT(([.D54]*([.C54]/100))*100);INT(([.D54]*([.C54]/100))*100)-1);ROUND(([.D54]*([.C54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55]*([.C55]/100))=0;&quot; &quot;;(IF(MOD(([.D55]*([.C55]/100))*100;1)=0.5;IF(MOD(INT(([.D55]*([.C55]/100))*100);2)=0;INT(([.D55]*([.C55]/100))*100);INT(([.D55]*([.C55]/100))*100)+1);IF(MOD(([.D55]*([.C55]/100))*100;1)=-0.5;IF(MOD(INT(([.D55]*([.C55]/100))*100);2)=0;INT(([.D55]*([.C55]/100))*100);INT(([.D55]*([.C55]/100))*100)-1);ROUND(([.D55]*([.C55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56]*([.C56]/100))=0;&quot; &quot;;(IF(MOD(([.D56]*([.C56]/100))*100;1)=0.5;IF(MOD(INT(([.D56]*([.C56]/100))*100);2)=0;INT(([.D56]*([.C56]/100))*100);INT(([.D56]*([.C56]/100))*100)+1);IF(MOD(([.D56]*([.C56]/100))*100;1)=-0.5;IF(MOD(INT(([.D56]*([.C56]/100))*100);2)=0;INT(([.D56]*([.C56]/100))*100);INT(([.D56]*([.C56]/100))*100)-1);ROUND(([.D56]*([.C56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57]*([.C57]/100))=0;&quot; &quot;;(IF(MOD(([.D57]*([.C57]/100))*100;1)=0.5;IF(MOD(INT(([.D57]*([.C57]/100))*100);2)=0;INT(([.D57]*([.C57]/100))*100);INT(([.D57]*([.C57]/100))*100)+1);IF(MOD(([.D57]*([.C57]/100))*100;1)=-0.5;IF(MOD(INT(([.D57]*([.C57]/100))*100);2)=0;INT(([.D57]*([.C57]/100))*100);INT(([.D57]*([.C57]/100))*100)-1);ROUND(([.D57]*([.C57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58]*([.C58]/100))=0;&quot; &quot;;(IF(MOD(([.D58]*([.C58]/100))*100;1)=0.5;IF(MOD(INT(([.D58]*([.C58]/100))*100);2)=0;INT(([.D58]*([.C58]/100))*100);INT(([.D58]*([.C58]/100))*100)+1);IF(MOD(([.D58]*([.C58]/100))*100;1)=-0.5;IF(MOD(INT(([.D58]*([.C58]/100))*100);2)=0;INT(([.D58]*([.C58]/100))*100);INT(([.D58]*([.C58]/100))*100)-1);ROUND(([.D58]*([.C58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59]*([.C59]/100))=0;&quot; &quot;;(IF(MOD(([.D59]*([.C59]/100))*100;1)=0.5;IF(MOD(INT(([.D59]*([.C59]/100))*100);2)=0;INT(([.D59]*([.C59]/100))*100);INT(([.D59]*([.C59]/100))*100)+1);IF(MOD(([.D59]*([.C59]/100))*100;1)=-0.5;IF(MOD(INT(([.D59]*([.C59]/100))*100);2)=0;INT(([.D59]*([.C59]/100))*100);INT(([.D59]*([.C59]/100))*100)-1);ROUND(([.D59]*([.C59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60]*([.C60]/100))=0;&quot; &quot;;(IF(MOD(([.D60]*([.C60]/100))*100;1)=0.5;IF(MOD(INT(([.D60]*([.C60]/100))*100);2)=0;INT(([.D60]*([.C60]/100))*100);INT(([.D60]*([.C60]/100))*100)+1);IF(MOD(([.D60]*([.C60]/100))*100;1)=-0.5;IF(MOD(INT(([.D60]*([.C60]/100))*100);2)=0;INT(([.D60]*([.C60]/100))*100);INT(([.D60]*([.C60]/100))*100)-1);ROUND(([.D60]*([.C60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61]*([.C61]/100))=0;&quot; &quot;;(IF(MOD(([.D61]*([.C61]/100))*100;1)=0.5;IF(MOD(INT(([.D61]*([.C61]/100))*100);2)=0;INT(([.D61]*([.C61]/100))*100);INT(([.D61]*([.C61]/100))*100)+1);IF(MOD(([.D61]*([.C61]/100))*100;1)=-0.5;IF(MOD(INT(([.D61]*([.C61]/100))*100);2)=0;INT(([.D61]*([.C61]/100))*100);INT(([.D61]*([.C61]/100))*100)-1);ROUND(([.D61]*([.C61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62]*([.C62]/100))=0;&quot; &quot;;(IF(MOD(([.D62]*([.C62]/100))*100;1)=0.5;IF(MOD(INT(([.D62]*([.C62]/100))*100);2)=0;INT(([.D62]*([.C62]/100))*100);INT(([.D62]*([.C62]/100))*100)+1);IF(MOD(([.D62]*([.C62]/100))*100;1)=-0.5;IF(MOD(INT(([.D62]*([.C62]/100))*100);2)=0;INT(([.D62]*([.C62]/100))*100);INT(([.D62]*([.C62]/100))*100)-1);ROUND(([.D62]*([.C62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63]*([.C63]/100))=0;&quot; &quot;;(IF(MOD(([.D63]*([.C63]/100))*100;1)=0.5;IF(MOD(INT(([.D63]*([.C63]/100))*100);2)=0;INT(([.D63]*([.C63]/100))*100);INT(([.D63]*([.C63]/100))*100)+1);IF(MOD(([.D63]*([.C63]/100))*100;1)=-0.5;IF(MOD(INT(([.D63]*([.C63]/100))*100);2)=0;INT(([.D63]*([.C63]/100))*100);INT(([.D63]*([.C63]/100))*100)-1);ROUND(([.D63]*([.C63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64]*([.C64]/100))=0;&quot; &quot;;(IF(MOD(([.D64]*([.C64]/100))*100;1)=0.5;IF(MOD(INT(([.D64]*([.C64]/100))*100);2)=0;INT(([.D64]*([.C64]/100))*100);INT(([.D64]*([.C64]/100))*100)+1);IF(MOD(([.D64]*([.C64]/100))*100;1)=-0.5;IF(MOD(INT(([.D64]*([.C64]/100))*100);2)=0;INT(([.D64]*([.C64]/100))*100);INT(([.D64]*([.C64]/100))*100)-1);ROUND(([.D64]*([.C64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65]*([.C65]/100))=0;&quot; &quot;;(IF(MOD(([.D65]*([.C65]/100))*100;1)=0.5;IF(MOD(INT(([.D65]*([.C65]/100))*100);2)=0;INT(([.D65]*([.C65]/100))*100);INT(([.D65]*([.C65]/100))*100)+1);IF(MOD(([.D65]*([.C65]/100))*100;1)=-0.5;IF(MOD(INT(([.D65]*([.C65]/100))*100);2)=0;INT(([.D65]*([.C65]/100))*100);INT(([.D65]*([.C65]/100))*100)-1);ROUND(([.D65]*([.C65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66]*([.C66]/100))=0;&quot; &quot;;(IF(MOD(([.D66]*([.C66]/100))*100;1)=0.5;IF(MOD(INT(([.D66]*([.C66]/100))*100);2)=0;INT(([.D66]*([.C66]/100))*100);INT(([.D66]*([.C66]/100))*100)+1);IF(MOD(([.D66]*([.C66]/100))*100;1)=-0.5;IF(MOD(INT(([.D66]*([.C66]/100))*100);2)=0;INT(([.D66]*([.C66]/100))*100);INT(([.D66]*([.C66]/100))*100)-1);ROUND(([.D66]*([.C66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67]*([.C67]/100))=0;&quot; &quot;;(IF(MOD(([.D67]*([.C67]/100))*100;1)=0.5;IF(MOD(INT(([.D67]*([.C67]/100))*100);2)=0;INT(([.D67]*([.C67]/100))*100);INT(([.D67]*([.C67]/100))*100)+1);IF(MOD(([.D67]*([.C67]/100))*100;1)=-0.5;IF(MOD(INT(([.D67]*([.C67]/100))*100);2)=0;INT(([.D67]*([.C67]/100))*100);INT(([.D67]*([.C67]/100))*100)-1);ROUND(([.D67]*([.C67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68]*([.C68]/100))=0;&quot; &quot;;(IF(MOD(([.D68]*([.C68]/100))*100;1)=0.5;IF(MOD(INT(([.D68]*([.C68]/100))*100);2)=0;INT(([.D68]*([.C68]/100))*100);INT(([.D68]*([.C68]/100))*100)+1);IF(MOD(([.D68]*([.C68]/100))*100;1)=-0.5;IF(MOD(INT(([.D68]*([.C68]/100))*100);2)=0;INT(([.D68]*([.C68]/100))*100);INT(([.D68]*([.C68]/100))*100)-1);ROUND(([.D68]*([.C68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69]*([.C69]/100))=0;&quot; &quot;;(IF(MOD(([.D69]*([.C69]/100))*100;1)=0.5;IF(MOD(INT(([.D69]*([.C69]/100))*100);2)=0;INT(([.D69]*([.C69]/100))*100);INT(([.D69]*([.C69]/100))*100)+1);IF(MOD(([.D69]*([.C69]/100))*100;1)=-0.5;IF(MOD(INT(([.D69]*([.C69]/100))*100);2)=0;INT(([.D69]*([.C69]/100))*100);INT(([.D69]*([.C69]/100))*100)-1);ROUND(([.D69]*([.C69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70]*([.C70]/100))=0;&quot; &quot;;(IF(MOD(([.D70]*([.C70]/100))*100;1)=0.5;IF(MOD(INT(([.D70]*([.C70]/100))*100);2)=0;INT(([.D70]*([.C70]/100))*100);INT(([.D70]*([.C70]/100))*100)+1);IF(MOD(([.D70]*([.C70]/100))*100;1)=-0.5;IF(MOD(INT(([.D70]*([.C70]/100))*100);2)=0;INT(([.D70]*([.C70]/100))*100);INT(([.D70]*([.C70]/100))*100)-1);ROUND(([.D70]*([.C70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71]*([.C71]/100))=0;&quot; &quot;;(IF(MOD(([.D71]*([.C71]/100))*100;1)=0.5;IF(MOD(INT(([.D71]*([.C71]/100))*100);2)=0;INT(([.D71]*([.C71]/100))*100);INT(([.D71]*([.C71]/100))*100)+1);IF(MOD(([.D71]*([.C71]/100))*100;1)=-0.5;IF(MOD(INT(([.D71]*([.C71]/100))*100);2)=0;INT(([.D71]*([.C71]/100))*100);INT(([.D71]*([.C71]/100))*100)-1);ROUND(([.D71]*([.C71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72]*([.C72]/100))=0;&quot; &quot;;(IF(MOD(([.D72]*([.C72]/100))*100;1)=0.5;IF(MOD(INT(([.D72]*([.C72]/100))*100);2)=0;INT(([.D72]*([.C72]/100))*100);INT(([.D72]*([.C72]/100))*100)+1);IF(MOD(([.D72]*([.C72]/100))*100;1)=-0.5;IF(MOD(INT(([.D72]*([.C72]/100))*100);2)=0;INT(([.D72]*([.C72]/100))*100);INT(([.D72]*([.C72]/100))*100)-1);ROUND(([.D72]*([.C72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73]*([.C73]/100))=0;&quot; &quot;;(IF(MOD(([.D73]*([.C73]/100))*100;1)=0.5;IF(MOD(INT(([.D73]*([.C73]/100))*100);2)=0;INT(([.D73]*([.C73]/100))*100);INT(([.D73]*([.C73]/100))*100)+1);IF(MOD(([.D73]*([.C73]/100))*100;1)=-0.5;IF(MOD(INT(([.D73]*([.C73]/100))*100);2)=0;INT(([.D73]*([.C73]/100))*100);INT(([.D73]*([.C73]/100))*100)-1);ROUND(([.D73]*([.C73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74]*([.C74]/100))=0;&quot; &quot;;(IF(MOD(([.D74]*([.C74]/100))*100;1)=0.5;IF(MOD(INT(([.D74]*([.C74]/100))*100);2)=0;INT(([.D74]*([.C74]/100))*100);INT(([.D74]*([.C74]/100))*100)+1);IF(MOD(([.D74]*([.C74]/100))*100;1)=-0.5;IF(MOD(INT(([.D74]*([.C74]/100))*100);2)=0;INT(([.D74]*([.C74]/100))*100);INT(([.D74]*([.C74]/100))*100)-1);ROUND(([.D74]*([.C74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75]*([.C75]/100))=0;&quot; &quot;;(IF(MOD(([.D75]*([.C75]/100))*100;1)=0.5;IF(MOD(INT(([.D75]*([.C75]/100))*100);2)=0;INT(([.D75]*([.C75]/100))*100);INT(([.D75]*([.C75]/100))*100)+1);IF(MOD(([.D75]*([.C75]/100))*100;1)=-0.5;IF(MOD(INT(([.D75]*([.C75]/100))*100);2)=0;INT(([.D75]*([.C75]/100))*100);INT(([.D75]*([.C75]/100))*100)-1);ROUND(([.D75]*([.C75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76]*([.C76]/100))=0;&quot; &quot;;(IF(MOD(([.D76]*([.C76]/100))*100;1)=0.5;IF(MOD(INT(([.D76]*([.C76]/100))*100);2)=0;INT(([.D76]*([.C76]/100))*100);INT(([.D76]*([.C76]/100))*100)+1);IF(MOD(([.D76]*([.C76]/100))*100;1)=-0.5;IF(MOD(INT(([.D76]*([.C76]/100))*100);2)=0;INT(([.D76]*([.C76]/100))*100);INT(([.D76]*([.C76]/100))*100)-1);ROUND(([.D76]*([.C76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77]*([.C77]/100))=0;&quot; &quot;;(IF(MOD(([.D77]*([.C77]/100))*100;1)=0.5;IF(MOD(INT(([.D77]*([.C77]/100))*100);2)=0;INT(([.D77]*([.C77]/100))*100);INT(([.D77]*([.C77]/100))*100)+1);IF(MOD(([.D77]*([.C77]/100))*100;1)=-0.5;IF(MOD(INT(([.D77]*([.C77]/100))*100);2)=0;INT(([.D77]*([.C77]/100))*100);INT(([.D77]*([.C77]/100))*100)-1);ROUND(([.D77]*([.C77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78]*([.C78]/100))=0;&quot; &quot;;(IF(MOD(([.D78]*([.C78]/100))*100;1)=0.5;IF(MOD(INT(([.D78]*([.C78]/100))*100);2)=0;INT(([.D78]*([.C78]/100))*100);INT(([.D78]*([.C78]/100))*100)+1);IF(MOD(([.D78]*([.C78]/100))*100;1)=-0.5;IF(MOD(INT(([.D78]*([.C78]/100))*100);2)=0;INT(([.D78]*([.C78]/100))*100);INT(([.D78]*([.C78]/100))*100)-1);ROUND(([.D78]*([.C78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79]*([.C79]/100))=0;&quot; &quot;;(IF(MOD(([.D79]*([.C79]/100))*100;1)=0.5;IF(MOD(INT(([.D79]*([.C79]/100))*100);2)=0;INT(([.D79]*([.C79]/100))*100);INT(([.D79]*([.C79]/100))*100)+1);IF(MOD(([.D79]*([.C79]/100))*100;1)=-0.5;IF(MOD(INT(([.D79]*([.C79]/100))*100);2)=0;INT(([.D79]*([.C79]/100))*100);INT(([.D79]*([.C79]/100))*100)-1);ROUND(([.D79]*([.C79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80]*([.C80]/100))=0;&quot; &quot;;(IF(MOD(([.D80]*([.C80]/100))*100;1)=0.5;IF(MOD(INT(([.D80]*([.C80]/100))*100);2)=0;INT(([.D80]*([.C80]/100))*100);INT(([.D80]*([.C80]/100))*100)+1);IF(MOD(([.D80]*([.C80]/100))*100;1)=-0.5;IF(MOD(INT(([.D80]*([.C80]/100))*100);2)=0;INT(([.D80]*([.C80]/100))*100);INT(([.D80]*([.C80]/100))*100)-1);ROUND(([.D80]*([.C80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81]*([.C81]/100))=0;&quot; &quot;;(IF(MOD(([.D81]*([.C81]/100))*100;1)=0.5;IF(MOD(INT(([.D81]*([.C81]/100))*100);2)=0;INT(([.D81]*([.C81]/100))*100);INT(([.D81]*([.C81]/100))*100)+1);IF(MOD(([.D81]*([.C81]/100))*100;1)=-0.5;IF(MOD(INT(([.D81]*([.C81]/100))*100);2)=0;INT(([.D81]*([.C81]/100))*100);INT(([.D81]*([.C81]/100))*100)-1);ROUND(([.D81]*([.C81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82]*([.C82]/100))=0;&quot; &quot;;(IF(MOD(([.D82]*([.C82]/100))*100;1)=0.5;IF(MOD(INT(([.D82]*([.C82]/100))*100);2)=0;INT(([.D82]*([.C82]/100))*100);INT(([.D82]*([.C82]/100))*100)+1);IF(MOD(([.D82]*([.C82]/100))*100;1)=-0.5;IF(MOD(INT(([.D82]*([.C82]/100))*100);2)=0;INT(([.D82]*([.C82]/100))*100);INT(([.D82]*([.C82]/100))*100)-1);ROUND(([.D82]*([.C82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83]*([.C83]/100))=0;&quot; &quot;;(IF(MOD(([.D83]*([.C83]/100))*100;1)=0.5;IF(MOD(INT(([.D83]*([.C83]/100))*100);2)=0;INT(([.D83]*([.C83]/100))*100);INT(([.D83]*([.C83]/100))*100)+1);IF(MOD(([.D83]*([.C83]/100))*100;1)=-0.5;IF(MOD(INT(([.D83]*([.C83]/100))*100);2)=0;INT(([.D83]*([.C83]/100))*100);INT(([.D83]*([.C83]/100))*100)-1);ROUND(([.D83]*([.C83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84]*([.C84]/100))=0;&quot; &quot;;(IF(MOD(([.D84]*([.C84]/100))*100;1)=0.5;IF(MOD(INT(([.D84]*([.C84]/100))*100);2)=0;INT(([.D84]*([.C84]/100))*100);INT(([.D84]*([.C84]/100))*100)+1);IF(MOD(([.D84]*([.C84]/100))*100;1)=-0.5;IF(MOD(INT(([.D84]*([.C84]/100))*100);2)=0;INT(([.D84]*([.C84]/100))*100);INT(([.D84]*([.C84]/100))*100)-1);ROUND(([.D84]*([.C84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85]*([.C85]/100))=0;&quot; &quot;;(IF(MOD(([.D85]*([.C85]/100))*100;1)=0.5;IF(MOD(INT(([.D85]*([.C85]/100))*100);2)=0;INT(([.D85]*([.C85]/100))*100);INT(([.D85]*([.C85]/100))*100)+1);IF(MOD(([.D85]*([.C85]/100))*100;1)=-0.5;IF(MOD(INT(([.D85]*([.C85]/100))*100);2)=0;INT(([.D85]*([.C85]/100))*100);INT(([.D85]*([.C85]/100))*100)-1);ROUND(([.D85]*([.C85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86]*([.C86]/100))=0;&quot; &quot;;(IF(MOD(([.D86]*([.C86]/100))*100;1)=0.5;IF(MOD(INT(([.D86]*([.C86]/100))*100);2)=0;INT(([.D86]*([.C86]/100))*100);INT(([.D86]*([.C86]/100))*100)+1);IF(MOD(([.D86]*([.C86]/100))*100;1)=-0.5;IF(MOD(INT(([.D86]*([.C86]/100))*100);2)=0;INT(([.D86]*([.C86]/100))*100);INT(([.D86]*([.C86]/100))*100)-1);ROUND(([.D86]*([.C86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87]*([.C87]/100))=0;&quot; &quot;;(IF(MOD(([.D87]*([.C87]/100))*100;1)=0.5;IF(MOD(INT(([.D87]*([.C87]/100))*100);2)=0;INT(([.D87]*([.C87]/100))*100);INT(([.D87]*([.C87]/100))*100)+1);IF(MOD(([.D87]*([.C87]/100))*100;1)=-0.5;IF(MOD(INT(([.D87]*([.C87]/100))*100);2)=0;INT(([.D87]*([.C87]/100))*100);INT(([.D87]*([.C87]/100))*100)-1);ROUND(([.D87]*([.C87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88]*([.C88]/100))=0;&quot; &quot;;(IF(MOD(([.D88]*([.C88]/100))*100;1)=0.5;IF(MOD(INT(([.D88]*([.C88]/100))*100);2)=0;INT(([.D88]*([.C88]/100))*100);INT(([.D88]*([.C88]/100))*100)+1);IF(MOD(([.D88]*([.C88]/100))*100;1)=-0.5;IF(MOD(INT(([.D88]*([.C88]/100))*100);2)=0;INT(([.D88]*([.C88]/100))*100);INT(([.D88]*([.C88]/100))*100)-1);ROUND(([.D88]*([.C88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89]*([.C89]/100))=0;&quot; &quot;;(IF(MOD(([.D89]*([.C89]/100))*100;1)=0.5;IF(MOD(INT(([.D89]*([.C89]/100))*100);2)=0;INT(([.D89]*([.C89]/100))*100);INT(([.D89]*([.C89]/100))*100)+1);IF(MOD(([.D89]*([.C89]/100))*100;1)=-0.5;IF(MOD(INT(([.D89]*([.C89]/100))*100);2)=0;INT(([.D89]*([.C89]/100))*100);INT(([.D89]*([.C89]/100))*100)-1);ROUND(([.D89]*([.C89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90]*([.C90]/100))=0;&quot; &quot;;(IF(MOD(([.D90]*([.C90]/100))*100;1)=0.5;IF(MOD(INT(([.D90]*([.C90]/100))*100);2)=0;INT(([.D90]*([.C90]/100))*100);INT(([.D90]*([.C90]/100))*100)+1);IF(MOD(([.D90]*([.C90]/100))*100;1)=-0.5;IF(MOD(INT(([.D90]*([.C90]/100))*100);2)=0;INT(([.D90]*([.C90]/100))*100);INT(([.D90]*([.C90]/100))*100)-1);ROUND(([.D90]*([.C90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91]*([.C91]/100))=0;&quot; &quot;;(IF(MOD(([.D91]*([.C91]/100))*100;1)=0.5;IF(MOD(INT(([.D91]*([.C91]/100))*100);2)=0;INT(([.D91]*([.C91]/100))*100);INT(([.D91]*([.C91]/100))*100)+1);IF(MOD(([.D91]*([.C91]/100))*100;1)=-0.5;IF(MOD(INT(([.D91]*([.C91]/100))*100);2)=0;INT(([.D91]*([.C91]/100))*100);INT(([.D91]*([.C91]/100))*100)-1);ROUND(([.D91]*([.C91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92]*([.C92]/100))=0;&quot; &quot;;(IF(MOD(([.D92]*([.C92]/100))*100;1)=0.5;IF(MOD(INT(([.D92]*([.C92]/100))*100);2)=0;INT(([.D92]*([.C92]/100))*100);INT(([.D92]*([.C92]/100))*100)+1);IF(MOD(([.D92]*([.C92]/100))*100;1)=-0.5;IF(MOD(INT(([.D92]*([.C92]/100))*100);2)=0;INT(([.D92]*([.C92]/100))*100);INT(([.D92]*([.C92]/100))*100)-1);ROUND(([.D92]*([.C92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93]*([.C93]/100))=0;&quot; &quot;;(IF(MOD(([.D93]*([.C93]/100))*100;1)=0.5;IF(MOD(INT(([.D93]*([.C93]/100))*100);2)=0;INT(([.D93]*([.C93]/100))*100);INT(([.D93]*([.C93]/100))*100)+1);IF(MOD(([.D93]*([.C93]/100))*100;1)=-0.5;IF(MOD(INT(([.D93]*([.C93]/100))*100);2)=0;INT(([.D93]*([.C93]/100))*100);INT(([.D93]*([.C93]/100))*100)-1);ROUND(([.D93]*([.C93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94]*([.C94]/100))=0;&quot; &quot;;(IF(MOD(([.D94]*([.C94]/100))*100;1)=0.5;IF(MOD(INT(([.D94]*([.C94]/100))*100);2)=0;INT(([.D94]*([.C94]/100))*100);INT(([.D94]*([.C94]/100))*100)+1);IF(MOD(([.D94]*([.C94]/100))*100;1)=-0.5;IF(MOD(INT(([.D94]*([.C94]/100))*100);2)=0;INT(([.D94]*([.C94]/100))*100);INT(([.D94]*([.C94]/100))*100)-1);ROUND(([.D94]*([.C94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95]*([.C95]/100))=0;&quot; &quot;;(IF(MOD(([.D95]*([.C95]/100))*100;1)=0.5;IF(MOD(INT(([.D95]*([.C95]/100))*100);2)=0;INT(([.D95]*([.C95]/100))*100);INT(([.D95]*([.C95]/100))*100)+1);IF(MOD(([.D95]*([.C95]/100))*100;1)=-0.5;IF(MOD(INT(([.D95]*([.C95]/100))*100);2)=0;INT(([.D95]*([.C95]/100))*100);INT(([.D95]*([.C95]/100))*100)-1);ROUND(([.D95]*([.C95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96]*([.C96]/100))=0;&quot; &quot;;(IF(MOD(([.D96]*([.C96]/100))*100;1)=0.5;IF(MOD(INT(([.D96]*([.C96]/100))*100);2)=0;INT(([.D96]*([.C96]/100))*100);INT(([.D96]*([.C96]/100))*100)+1);IF(MOD(([.D96]*([.C96]/100))*100;1)=-0.5;IF(MOD(INT(([.D96]*([.C96]/100))*100);2)=0;INT(([.D96]*([.C96]/100))*100);INT(([.D96]*([.C96]/100))*100)-1);ROUND(([.D96]*([.C96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97]*([.C97]/100))=0;&quot; &quot;;(IF(MOD(([.D97]*([.C97]/100))*100;1)=0.5;IF(MOD(INT(([.D97]*([.C97]/100))*100);2)=0;INT(([.D97]*([.C97]/100))*100);INT(([.D97]*([.C97]/100))*100)+1);IF(MOD(([.D97]*([.C97]/100))*100;1)=-0.5;IF(MOD(INT(([.D97]*([.C97]/100))*100);2)=0;INT(([.D97]*([.C97]/100))*100);INT(([.D97]*([.C97]/100))*100)-1);ROUND(([.D97]*([.C97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98]*([.C98]/100))=0;&quot; &quot;;(IF(MOD(([.D98]*([.C98]/100))*100;1)=0.5;IF(MOD(INT(([.D98]*([.C98]/100))*100);2)=0;INT(([.D98]*([.C98]/100))*100);INT(([.D98]*([.C98]/100))*100)+1);IF(MOD(([.D98]*([.C98]/100))*100;1)=-0.5;IF(MOD(INT(([.D98]*([.C98]/100))*100);2)=0;INT(([.D98]*([.C98]/100))*100);INT(([.D98]*([.C98]/100))*100)-1);ROUND(([.D98]*([.C98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4"/>
          <table:table-cell table:content-validation-name="val1" table:style-name="ce36"/>
          <table:table-cell table:content-validation-name="val3" table:style-name="ce16"/>
          <table:table-cell table:style-name="ce17"/>
          <table:table-cell office:value-type="string" office:string-value=" " table:formula="of:=IF(([.D99]*([.C99]/100))=0;&quot; &quot;;(IF(MOD(([.D99]*([.C99]/100))*100;1)=0.5;IF(MOD(INT(([.D99]*([.C99]/100))*100);2)=0;INT(([.D99]*([.C99]/100))*100);INT(([.D99]*([.C99]/100))*100)+1);IF(MOD(([.D99]*([.C99]/100))*100;1)=-0.5;IF(MOD(INT(([.D99]*([.C99]/100))*100);2)=0;INT(([.D99]*([.C99]/100))*100);INT(([.D99]*([.C99]/100))*100)-1);ROUND(([.D99]*([.C99]/100))*100;0)))/100))" table:style-name="ce18">
            <text:p><text:s/></text:p>
          </table:table-cell>
          <table:table-cell table:number-columns-repeated="16379" table:style-name="ce1"/>
        </table:table-row>
        <table:table-row table:style-name="ro5">
          <table:table-cell table:content-validation-name="val2" table:style-name="ce19"/>
          <table:table-cell table:content-validation-name="val1" table:style-name="ce37"/>
          <table:table-cell table:content-validation-name="val3" table:style-name="ce21"/>
          <table:table-cell table:style-name="ce22"/>
          <table:table-cell office:value-type="string" office:string-value=" " table:formula="of:=IF(([.D100]*([.C100]/100))=0;&quot; &quot;;(IF(MOD(([.D100]*([.C100]/100))*100;1)=0.5;IF(MOD(INT(([.D100]*([.C100]/100))*100);2)=0;INT(([.D100]*([.C100]/100))*100);INT(([.D100]*([.C100]/100))*100)+1);IF(MOD(([.D100]*([.C100]/100))*100;1)=-0.5;IF(MOD(INT(([.D100]*([.C100]/100))*100);2)=0;INT(([.D100]*([.C100]/100))*100);INT(([.D100]*([.C100]/100))*100)-1);ROUND(([.D100]*([.C100]/100))*100;0)))/100))" table:style-name="ce23">
            <text:p><text:s/></text:p>
          </table:table-cell>
          <table:table-cell table:number-columns-repeated="16379" table:style-name="ce1"/>
        </table:table-row>
        <table:table-row table:number-rows-repeated="1048476" table:style-name="ro6">
          <table:table-cell table:number-columns-repeated="16384"/>
        </table:table-row>
      </table:table>
      <table:table table:name="Notes" table:style-name="ta1">
        <table:table-column table:style-name="co6" table:default-cell-style-name="ce8"/>
        <table:table-column table:style-name="co5" table:number-columns-repeated="16383" table:default-cell-style-name="ce2"/>
        <table:table-row table:style-name="ro7">
          <table:table-cell office:value-type="string" table:style-name="ce24">
            <text:p>Notes for completing this return</text:p>
          </table:table-cell>
          <table:table-cell table:number-columns-repeated="16383"/>
        </table:table-row>
        <table:table-row table:style-name="ro6">
          <table:table-cell table:number-columns-repeated="16384"/>
        </table:table-row>
        <table:table-row table:style-name="ro8">
          <table:table-cell office:value-type="string" table:style-name="ce25">
            <text:p>Ensure there is always a country in columns A and B.</text:p>
          </table:table-cell>
          <table:table-cell table:number-columns-repeated="16383" table:style-name="ce1"/>
        </table:table-row>
        <table:table-row table:style-name="ro9">
          <table:table-cell table:style-name="ce26"/>
          <table:table-cell table:number-columns-repeated="16383" table:style-name="ce1"/>
        </table:table-row>
        <table:table-row table:style-name="ro10">
          <table:table-cell office:value-type="string" table:style-name="ce27">
            <text:p>If the VAT rates in column C are out of date, you can enter your own rate.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28">
            <text:p><text:a xlink:href="https://europa.eu/youreurope/business/taxation/vat/vat-rules-rates/index_en.htm#inline-nav-7">Check the latest VAT rates on the EU website</text:a></text:p>
          </table:table-cell>
          <table:table-cell table:number-columns-repeated="16383" table:style-name="ce1"/>
        </table:table-row>
        <table:table-row table:style-name="ro9">
          <table:table-cell table:style-name="ce29"/>
          <table:table-cell table:number-columns-repeated="16383" table:style-name="ce1"/>
        </table:table-row>
        <table:table-row table:style-name="ro8">
          <table:table-cell office:value-type="string" table:style-name="ce25">
            <text:p>Do not add more that 2 decimal places.</text:p>
          </table:table-cell>
          <table:table-cell table:number-columns-repeated="16383" table:style-name="ce1"/>
        </table:table-row>
        <table:table-row table:style-name="ro9">
          <table:table-cell table:style-name="ce26"/>
          <table:table-cell table:number-columns-repeated="16383" table:style-name="ce1"/>
        </table:table-row>
        <table:table-row table:style-name="ro11">
          <table:table-cell office:value-type="string" table:style-name="ce25">
            <text:p>Check the auto-calculated VAT amounts due in column E are correct.</text:p>
          </table:table-cell>
          <table:table-cell table:number-columns-repeated="16383" table:style-name="ce1"/>
        </table:table-row>
        <table:table-row table:style-name="ro9">
          <table:table-cell table:style-name="ce26"/>
          <table:table-cell table:number-columns-repeated="16383" table:style-name="ce1"/>
        </table:table-row>
        <table:table-row table:style-name="ro10">
          <table:table-cell office:value-type="string" table:style-name="ce25">
            <text:p>When saving as a CSV (Comma-Separated Values) file, you can ignore any warnings about losing data.</text:p>
          </table:table-cell>
          <table:table-cell table:number-columns-repeated="16383" table:style-name="ce1"/>
        </table:table-row>
        <table:table-row table:style-name="ro6">
          <table:table-cell table:number-columns-repeated="16384"/>
        </table:table-row>
        <table:table-row table:style-name="ro8">
          <table:table-cell office:value-type="string" table:style-name="ce27">
            <text:p>Only select countries from this list: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30">
            <text:p>Northern Ireland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30">
            <text:p>Austria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30">
            <text:p>Belgium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30">
            <text:p>Bulgaria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30">
            <text:p>Croatia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30">
            <text:p>Cyprus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30">
            <text:p>Czech Republic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30">
            <text:p>Denmark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30">
            <text:p>Estonia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30">
            <text:p>Finland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30">
            <text:p>France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30">
            <text:p>Germany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30">
            <text:p>Greece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30">
            <text:p>Hungary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30">
            <text:p>Ireland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30">
            <text:p>Italy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30">
            <text:p>Latvia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30">
            <text:p>Lithuania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30">
            <text:p>Luxembourg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30">
            <text:p>Malta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30">
            <text:p>Netherlands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30">
            <text:p>Poland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30">
            <text:p>Portugal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30">
            <text:p>Romania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30">
            <text:p>Slovakia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30">
            <text:p>Slovenia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30">
            <text:p>Spain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31">
            <text:p>Sweden</text:p>
          </table:table-cell>
          <table:table-cell table:number-columns-repeated="16383" table:style-name="ce1"/>
        </table:table-row>
        <table:table-row table:number-rows-repeated="1048534" table:style-name="ro6">
          <table:table-cell table:number-columns-repeated="16384"/>
        </table:table-row>
      </table:table>
      <table:table table:name="VAT_rates" table:style-name="ta1">
        <table:table-column table:style-name="co7" table:number-columns-repeated="16384" table:default-cell-style-name="ce1"/>
        <table:table-row table:style-name="ro13">
          <table:table-cell office:value-type="string" table:style-name="ce32">
            <text:p>EU VAT rates, correct for June 2026</text:p>
          </table:table-cell>
          <table:table-cell table:number-columns-repeated="16383" table:style-name="ce1"/>
        </table:table-row>
        <table:table-row table:style-name="ro14">
          <table:table-cell office:value-type="string" table:style-name="ce33">
            <text:p>Austria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orthern Ire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pain</text:p>
          </table:table-cell>
          <table:table-cell office:value-type="string" table:style-name="ce7">
            <text:p>Sweden</text:p>
          </table:table-cell>
          <table:table-cell table:number-columns-repeated="16356"/>
        </table:table-row>
        <table:table-row table:style-name="ro15">
          <table:table-cell office:value-type="float" office:value="20" table:style-name="ce31">
            <text:p>20</text:p>
          </table:table-cell>
          <table:table-cell office:value-type="float" office:value="21" table:style-name="ce31">
            <text:p>21</text:p>
          </table:table-cell>
          <table:table-cell office:value-type="float" office:value="20" table:style-name="ce31">
            <text:p>20</text:p>
          </table:table-cell>
          <table:table-cell office:value-type="float" office:value="25" table:style-name="ce31">
            <text:p>25</text:p>
          </table:table-cell>
          <table:table-cell office:value-type="float" office:value="19" table:style-name="ce31">
            <text:p>19</text:p>
          </table:table-cell>
          <table:table-cell office:value-type="float" office:value="21" table:style-name="ce31">
            <text:p>21</text:p>
          </table:table-cell>
          <table:table-cell office:value-type="float" office:value="25" table:style-name="ce31">
            <text:p>25</text:p>
          </table:table-cell>
          <table:table-cell office:value-type="float" office:value="24" table:style-name="ce31">
            <text:p>24</text:p>
          </table:table-cell>
          <table:table-cell office:value-type="float" office:value="25.5" table:style-name="ce31">
            <text:p>25.5</text:p>
          </table:table-cell>
          <table:table-cell office:value-type="float" office:value="20" table:style-name="ce31">
            <text:p>20</text:p>
          </table:table-cell>
          <table:table-cell office:value-type="float" office:value="19" table:style-name="ce31">
            <text:p>19</text:p>
          </table:table-cell>
          <table:table-cell office:value-type="float" office:value="24" table:style-name="ce31">
            <text:p>24</text:p>
          </table:table-cell>
          <table:table-cell office:value-type="float" office:value="27" table:style-name="ce31">
            <text:p>27</text:p>
          </table:table-cell>
          <table:table-cell office:value-type="float" office:value="23" table:style-name="ce31">
            <text:p>23</text:p>
          </table:table-cell>
          <table:table-cell office:value-type="float" office:value="22" table:style-name="ce31">
            <text:p>22</text:p>
          </table:table-cell>
          <table:table-cell office:value-type="float" office:value="21" table:style-name="ce31">
            <text:p>21</text:p>
          </table:table-cell>
          <table:table-cell office:value-type="float" office:value="21" table:style-name="ce31">
            <text:p>21</text:p>
          </table:table-cell>
          <table:table-cell office:value-type="float" office:value="17" table:style-name="ce31">
            <text:p>17</text:p>
          </table:table-cell>
          <table:table-cell office:value-type="float" office:value="18" table:style-name="ce31">
            <text:p>18</text:p>
          </table:table-cell>
          <table:table-cell office:value-type="float" office:value="21" table:style-name="ce31">
            <text:p>21</text:p>
          </table:table-cell>
          <table:table-cell office:value-type="float" office:value="20" table:style-name="ce31">
            <text:p>20</text:p>
          </table:table-cell>
          <table:table-cell office:value-type="float" office:value="23" table:style-name="ce31">
            <text:p>23</text:p>
          </table:table-cell>
          <table:table-cell office:value-type="float" office:value="23" table:style-name="ce31">
            <text:p>23</text:p>
          </table:table-cell>
          <table:table-cell office:value-type="float" office:value="21" table:style-name="ce31">
            <text:p>21</text:p>
          </table:table-cell>
          <table:table-cell office:value-type="float" office:value="23" table:style-name="ce31">
            <text:p>23</text:p>
          </table:table-cell>
          <table:table-cell office:value-type="float" office:value="22" table:style-name="ce31">
            <text:p>22</text:p>
          </table:table-cell>
          <table:table-cell office:value-type="float" office:value="21" table:style-name="ce31">
            <text:p>21</text:p>
          </table:table-cell>
          <table:table-cell office:value-type="float" office:value="25" table:style-name="ce31">
            <text:p>25</text:p>
          </table:table-cell>
          <table:table-cell table:number-columns-repeated="16356"/>
        </table:table-row>
        <table:table-row table:style-name="ro15">
          <table:table-cell office:value-type="float" office:value="13" table:style-name="ce34">
            <text:p>13</text:p>
          </table:table-cell>
          <table:table-cell office:value-type="float" office:value="12" table:style-name="ce34">
            <text:p>12</text:p>
          </table:table-cell>
          <table:table-cell office:value-type="float" office:value="9" table:style-name="ce34">
            <text:p>9</text:p>
          </table:table-cell>
          <table:table-cell office:value-type="float" office:value="13" table:style-name="ce34">
            <text:p>13</text:p>
          </table:table-cell>
          <table:table-cell office:value-type="float" office:value="9" table:style-name="ce34">
            <text:p>9</text:p>
          </table:table-cell>
          <table:table-cell office:value-type="float" office:value="12" table:style-name="ce34">
            <text:p>12</text:p>
          </table:table-cell>
          <table:table-cell table:style-name="ce34"/>
          <table:table-cell office:value-type="float" office:value="9" table:style-name="ce34">
            <text:p>9</text:p>
          </table:table-cell>
          <table:table-cell office:value-type="float" office:value="14" table:style-name="ce34">
            <text:p>14</text:p>
          </table:table-cell>
          <table:table-cell office:value-type="float" office:value="10" table:style-name="ce34">
            <text:p>10</text:p>
          </table:table-cell>
          <table:table-cell office:value-type="float" office:value="7" table:style-name="ce34">
            <text:p>7</text:p>
          </table:table-cell>
          <table:table-cell office:value-type="float" office:value="13" table:style-name="ce34">
            <text:p>13</text:p>
          </table:table-cell>
          <table:table-cell office:value-type="float" office:value="18" table:style-name="ce34">
            <text:p>18</text:p>
          </table:table-cell>
          <table:table-cell office:value-type="float" office:value="13.5" table:style-name="ce34">
            <text:p>13.5</text:p>
          </table:table-cell>
          <table:table-cell office:value-type="float" office:value="10" table:style-name="ce34">
            <text:p>10</text:p>
          </table:table-cell>
          <table:table-cell office:value-type="float" office:value="12" table:style-name="ce34">
            <text:p>12</text:p>
          </table:table-cell>
          <table:table-cell office:value-type="float" office:value="9" table:style-name="ce34">
            <text:p>9</text:p>
          </table:table-cell>
          <table:table-cell office:value-type="float" office:value="14" table:style-name="ce34">
            <text:p>14</text:p>
          </table:table-cell>
          <table:table-cell office:value-type="float" office:value="7" table:style-name="ce34">
            <text:p>7</text:p>
          </table:table-cell>
          <table:table-cell office:value-type="float" office:value="9" table:style-name="ce34">
            <text:p>9</text:p>
          </table:table-cell>
          <table:table-cell office:value-type="float" office:value="5" table:style-name="ce34">
            <text:p>5</text:p>
          </table:table-cell>
          <table:table-cell office:value-type="float" office:value="8" table:style-name="ce34">
            <text:p>8</text:p>
          </table:table-cell>
          <table:table-cell office:value-type="float" office:value="13" table:style-name="ce34">
            <text:p>13</text:p>
          </table:table-cell>
          <table:table-cell office:value-type="float" office:value="11" table:style-name="ce34">
            <text:p>11</text:p>
          </table:table-cell>
          <table:table-cell office:value-type="float" office:value="19" table:style-name="ce34">
            <text:p>19</text:p>
          </table:table-cell>
          <table:table-cell office:value-type="float" office:value="9.5" table:style-name="ce34">
            <text:p>9.5</text:p>
          </table:table-cell>
          <table:table-cell office:value-type="float" office:value="10" table:style-name="ce34">
            <text:p>10</text:p>
          </table:table-cell>
          <table:table-cell office:value-type="float" office:value="12" table:style-name="ce34">
            <text:p>12</text:p>
          </table:table-cell>
          <table:table-cell table:number-columns-repeated="16356"/>
        </table:table-row>
        <table:table-row table:style-name="ro15">
          <table:table-cell office:value-type="float" office:value="10" table:style-name="ce34">
            <text:p>10</text:p>
          </table:table-cell>
          <table:table-cell office:value-type="float" office:value="6" table:style-name="ce34">
            <text:p>6</text:p>
          </table:table-cell>
          <table:table-cell table:style-name="ce34"/>
          <table:table-cell office:value-type="float" office:value="5" table:style-name="ce34">
            <text:p>5</text:p>
          </table:table-cell>
          <table:table-cell office:value-type="float" office:value="5" table:style-name="ce34">
            <text:p>5</text:p>
          </table:table-cell>
          <table:table-cell table:number-columns-repeated="3" table:style-name="ce34"/>
          <table:table-cell office:value-type="float" office:value="10" table:style-name="ce34">
            <text:p>10</text:p>
          </table:table-cell>
          <table:table-cell office:value-type="float" office:value="5.5" table:style-name="ce34">
            <text:p>5.5</text:p>
          </table:table-cell>
          <table:table-cell table:style-name="ce34"/>
          <table:table-cell office:value-type="float" office:value="6" table:style-name="ce34">
            <text:p>6</text:p>
          </table:table-cell>
          <table:table-cell office:value-type="float" office:value="5" table:style-name="ce34">
            <text:p>5</text:p>
          </table:table-cell>
          <table:table-cell office:value-type="float" office:value="9" table:style-name="ce34">
            <text:p>9</text:p>
          </table:table-cell>
          <table:table-cell office:value-type="float" office:value="5" table:style-name="ce34">
            <text:p>5</text:p>
          </table:table-cell>
          <table:table-cell office:value-type="float" office:value="5" table:style-name="ce34">
            <text:p>5</text:p>
          </table:table-cell>
          <table:table-cell office:value-type="float" office:value="5" table:style-name="ce34">
            <text:p>5</text:p>
          </table:table-cell>
          <table:table-cell office:value-type="float" office:value="8" table:style-name="ce34">
            <text:p>8</text:p>
          </table:table-cell>
          <table:table-cell office:value-type="float" office:value="5" table:style-name="ce34">
            <text:p>5</text:p>
          </table:table-cell>
          <table:table-cell table:number-columns-repeated="2" table:style-name="ce34"/>
          <table:table-cell office:value-type="float" office:value="5" table:style-name="ce34">
            <text:p>5</text:p>
          </table:table-cell>
          <table:table-cell office:value-type="float" office:value="6" table:style-name="ce34">
            <text:p>6</text:p>
          </table:table-cell>
          <table:table-cell table:style-name="ce34"/>
          <table:table-cell office:value-type="float" office:value="5" table:style-name="ce34">
            <text:p>5</text:p>
          </table:table-cell>
          <table:table-cell office:value-type="float" office:value="5" table:style-name="ce34">
            <text:p>5</text:p>
          </table:table-cell>
          <table:table-cell table:style-name="ce34"/>
          <table:table-cell office:value-type="float" office:value="6" table:style-name="ce34">
            <text:p>6</text:p>
          </table:table-cell>
          <table:table-cell table:number-columns-repeated="16356"/>
        </table:table-row>
        <table:table-row table:style-name="ro15">
          <table:table-cell table:number-columns-repeated="9" table:style-name="ce34"/>
          <table:table-cell office:value-type="float" office:value="2.1" table:style-name="ce34">
            <text:p>2.1</text:p>
          </table:table-cell>
          <table:table-cell table:number-columns-repeated="3" table:style-name="ce34"/>
          <table:table-cell office:value-type="float" office:value="4.8" table:style-name="ce34">
            <text:p>4.8</text:p>
          </table:table-cell>
          <table:table-cell office:value-type="float" office:value="4" table:style-name="ce34">
            <text:p>4</text:p>
          </table:table-cell>
          <table:table-cell table:number-columns-repeated="2" table:style-name="ce34"/>
          <table:table-cell office:value-type="float" office:value="3" table:style-name="ce34">
            <text:p>3</text:p>
          </table:table-cell>
          <table:table-cell table:number-columns-repeated="10" table:style-name="ce34"/>
          <table:table-cell table:number-columns-repeated="16356"/>
        </table:table-row>
        <table:table-row table:number-rows-repeated="1048570" table:style-name="ro6">
          <table:table-cell table:number-columns-repeated="16384"/>
        </table:table-row>
      </table:table>
      <table:named-expressions>
        <table:named-range table:name="Austria" table:cell-range-address="VAT_rates.$A$3:VAT_rates.$A$5" table:base-cell-address="VAT_rates.$A$1"/>
        <table:named-range table:name="Belgium" table:cell-range-address="VAT_rates.$B$3:VAT_rates.$B$5" table:base-cell-address="VAT_rates.$A$1"/>
        <table:named-range table:name="Bulgaria" table:cell-range-address="VAT_rates.$C$3:VAT_rates.$C$4" table:base-cell-address="VAT_rates.$A$1"/>
        <table:named-range table:name="Croatia" table:cell-range-address="VAT_rates.$D$3:VAT_rates.$D$5" table:base-cell-address="VAT_rates.$A$1"/>
        <table:named-range table:name="Cyprus" table:cell-range-address="VAT_rates.$E$3:VAT_rates.$E$5" table:base-cell-address="VAT_rates.$A$1"/>
        <table:named-range table:name="Czech_Republic" table:cell-range-address="VAT_rates.$F$3:VAT_rates.$F$4" table:base-cell-address="VAT_rates.$A$1"/>
        <table:named-range table:name="Denmark" table:cell-range-address="VAT_rates.$G$3" table:base-cell-address="VAT_rates.$A$1"/>
        <table:named-range table:name="Estonia" table:cell-range-address="VAT_rates.$H$3:VAT_rates.$H$4" table:base-cell-address="VAT_rates.$A$1"/>
        <table:named-range table:name="Finland" table:cell-range-address="VAT_rates.$I$3:VAT_rates.$I$5" table:base-cell-address="VAT_rates.$A$1"/>
        <table:named-range table:name="France" table:cell-range-address="VAT_rates.$J$3:VAT_rates.$J$6" table:base-cell-address="VAT_rates.$A$1"/>
        <table:named-range table:name="Germany" table:cell-range-address="VAT_rates.$K$3:VAT_rates.$K$4" table:base-cell-address="VAT_rates.$A$1"/>
        <table:named-range table:name="Greece" table:cell-range-address="VAT_rates.$L$3:VAT_rates.$L$5" table:base-cell-address="VAT_rates.$A$1"/>
        <table:named-range table:name="Hungary" table:cell-range-address="VAT_rates.$M$3:VAT_rates.$M$5" table:base-cell-address="VAT_rates.$A$1"/>
        <table:named-range table:name="Ireland" table:cell-range-address="VAT_rates.$N$3:VAT_rates.$N$6" table:base-cell-address="VAT_rates.$A$1"/>
        <table:named-range table:name="Italy" table:cell-range-address="VAT_rates.$O$3:VAT_rates.$O$6" table:base-cell-address="VAT_rates.$A$1"/>
        <table:named-range table:name="Latvia" table:cell-range-address="VAT_rates.$P$3:VAT_rates.$P$5" table:base-cell-address="VAT_rates.$A$1"/>
        <table:named-range table:name="Lithuania" table:cell-range-address="VAT_rates.$Q$3:VAT_rates.$Q$5" table:base-cell-address="VAT_rates.$A$1"/>
        <table:named-range table:name="Luxembourg" table:cell-range-address="VAT_rates.$R$3:VAT_rates.$R$6" table:base-cell-address="VAT_rates.$A$1"/>
        <table:named-range table:name="Malta" table:cell-range-address="VAT_rates.$S$3:VAT_rates.$S$5" table:base-cell-address="VAT_rates.$A$1"/>
        <table:named-range table:name="Netherlands" table:cell-range-address="VAT_rates.$T$3:VAT_rates.$T$4" table:base-cell-address="VAT_rates.$A$1"/>
        <table:named-range table:name="Northern_Ireland" table:cell-range-address="VAT_rates.$U$3:VAT_rates.$U$4" table:base-cell-address="VAT_rates.$A$1"/>
        <table:named-range table:name="Poland" table:cell-range-address="VAT_rates.$V$3:VAT_rates.$V$5" table:base-cell-address="VAT_rates.$A$1"/>
        <table:named-range table:name="Portugal" table:cell-range-address="VAT_rates.$W$3:VAT_rates.$W$5" table:base-cell-address="VAT_rates.$A$1"/>
        <table:named-range table:name="Romania" table:cell-range-address="VAT_rates.$X$3:VAT_rates.$X$4" table:base-cell-address="VAT_rates.$A$1"/>
        <table:named-range table:name="Slovakia" table:cell-range-address="VAT_rates.$Y$3:VAT_rates.$Y$5" table:base-cell-address="VAT_rates.$A$1"/>
        <table:named-range table:name="Slovenia" table:cell-range-address="VAT_rates.$Z$3:VAT_rates.$Z$5" table:base-cell-address="VAT_rates.$A$1"/>
        <table:named-range table:name="Spain" table:cell-range-address="VAT_rates.$AA$3:VAT_rates.$AA$4" table:base-cell-address="VAT_rates.$A$1"/>
        <table:named-range table:name="Sweden" table:cell-range-address="VAT_rates.$AB$3:VAT_rates.$AB$5" table:base-cell-address="VAT_rate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f1" style:family="table-cell" style:data-style-name="N0">
      <style:table-cell-properties fo:background-color="#FFC7CE"/>
      <style:text-properties fo:color="#9C0006"/>
    </style: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531</meta:generator>
    <dc:title>OSS return template</dc:title>
    <dc:description/>
    <dc:subject/>
    <meta:initial-creator>HMRC</meta:initial-creator>
    <dc:creator>Joseph Passi</dc:creator>
    <meta:creation-date>2026-01-26T19:40:14Z</meta:creation-date>
    <dc:date>2026-06-04T16:45:53Z</dc:date>
  </office:meta>
</office:document-meta>
</file>